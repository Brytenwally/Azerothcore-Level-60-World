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89cm"/>
    </style:style>
    <style:style style:name="co3" style:family="table-column">
      <style:table-column-properties fo:break-before="auto" style:column-width="8.4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Values for Spell Damag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Itemlevel comment</text:p>
          </table:table-cell>
          <table:table-cell office:value-type="string" calcext:value-type="string">
            <text:p>HP 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3829" calcext:value-type="float">
            <text:p>382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3902" calcext:value-type="float">
            <text:p>390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3956" calcext:value-type="float">
            <text:p>395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4304" calcext:value-type="float">
            <text:p>430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4722" calcext:value-type="float">
            <text:p>472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5071" calcext:value-type="float">
            <text:p>50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5141" calcext:value-type="float">
            <text:p>514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5202" calcext:value-type="float">
            <text:p>520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5264" calcext:value-type="float">
            <text:p>526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5347" calcext:value-type="float">
            <text:p>53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6231" calcext:value-type="float">
            <text:p>623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12620" calcext:value-type="float">
            <text:p>12620</text:p>
          </table:table-cell>
          <table:table-cell office:value-type="string" calcext:value-type="string">
            <text:p>big jump from vanilla greens to TBC green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12888" calcext:value-type="float">
            <text:p>1288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13214" calcext:value-type="float">
            <text:p>1321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13568" calcext:value-type="float">
            <text:p>1356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14062" calcext:value-type="float">
            <text:p>1406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14436" calcext:value-type="float">
            <text:p>1443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15139" calcext:value-type="float">
            <text:p>1513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15541" calcext:value-type="float">
            <text:p>1554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16094" calcext:value-type="float">
            <text:p>1609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16377" calcext:value-type="float">
            <text:p>1637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22304" calcext:value-type="float">
            <text:p>22304</text:p>
          </table:table-cell>
          <table:table-cell office:value-type="string" calcext:value-type="string">
            <text:p>big jump from TBC greens to Wotlk green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22615" calcext:value-type="float">
            <text:p>2261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22936" calcext:value-type="float">
            <text:p>2293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23568" calcext:value-type="float">
            <text:p>2356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25024" calcext:value-type="float">
            <text:p>2502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26015" calcext:value-type="float">
            <text:p>2601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26863" calcext:value-type="float">
            <text:p>2686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26980" calcext:value-type="float">
            <text:p>2698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28528" calcext:value-type="float">
            <text:p>2852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Green gear, Item level irrelevant</text:p>
          </table:table-cell>
          <table:table-cell office:value-type="float" office:value="30229" calcext:value-type="float">
            <text:p>3022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ear to get into heroic/endgame dungeons</text:p>
          </table:table-cell>
          <table:table-cell office:value-type="float" office:value="5870" calcext:value-type="float">
            <text:p>58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ear to get into heroic/endgame dungeons</text:p>
          </table:table-cell>
          <table:table-cell office:value-type="float" office:value="15907" calcext:value-type="float">
            <text:p>1590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Gear to get into heroic/endgame dungeons</text:p>
          </table:table-cell>
          <table:table-cell office:value-type="float" office:value="31212" calcext:value-type="float">
            <text:p>3121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re raid BIS</text:p>
          </table:table-cell>
          <table:table-cell office:value-type="float" office:value="6534" calcext:value-type="float">
            <text:p>653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re raid BIS</text:p>
          </table:table-cell>
          <table:table-cell office:value-type="float" office:value="13927" calcext:value-type="float">
            <text:p>1392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e raid BIS</text:p>
          </table:table-cell>
          <table:table-cell office:value-type="float" office:value="32578" calcext:value-type="float">
            <text:p>3257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ase 1</text:p>
          </table:table-cell>
          <table:table-cell office:value-type="float" office:value="6781" calcext:value-type="float">
            <text:p>6781</text:p>
          </table:table-cell>
          <table:table-cell office:value-type="string" calcext:value-type="string">
            <text:p>MC, Onyxia, Z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hase 2</text:p>
          </table:table-cell>
          <table:table-cell office:value-type="float" office:value="7161" calcext:value-type="float">
            <text:p>7161</text:p>
          </table:table-cell>
          <table:table-cell office:value-type="string" calcext:value-type="string">
            <text:p>BW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hase 3</text:p>
          </table:table-cell>
          <table:table-cell office:value-type="float" office:value="7721" calcext:value-type="float">
            <text:p>7721</text:p>
          </table:table-cell>
          <table:table-cell office:value-type="string" calcext:value-type="string">
            <text:p>AQ 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hase 4</text:p>
          </table:table-cell>
          <table:table-cell office:value-type="float" office:value="8301" calcext:value-type="float">
            <text:p>8301</text:p>
          </table:table-cell>
          <table:table-cell office:value-type="string" calcext:value-type="string">
            <text:p>Naxx 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hase 5</text:p>
          </table:table-cell>
          <table:table-cell office:value-type="float" office:value="18667" calcext:value-type="float">
            <text:p>18667</text:p>
          </table:table-cell>
          <table:table-cell office:value-type="string" calcext:value-type="string">
            <text:p>Kara, Gruul, Ma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hase 6</text:p>
          </table:table-cell>
          <table:table-cell office:value-type="float" office:value="19217" calcext:value-type="float">
            <text:p>19217</text:p>
          </table:table-cell>
          <table:table-cell office:value-type="string" calcext:value-type="string">
            <text:p>SSC, TK, Z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hase 7</text:p>
          </table:table-cell>
          <table:table-cell office:value-type="float" office:value="19377" calcext:value-type="float">
            <text:p>19377</text:p>
          </table:table-cell>
          <table:table-cell office:value-type="string" calcext:value-type="string">
            <text:p>BT, Hyja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hase 8</text:p>
          </table:table-cell>
          <table:table-cell office:value-type="float" office:value="20876" calcext:value-type="float">
            <text:p>20876</text:p>
          </table:table-cell>
          <table:table-cell office:value-type="string" calcext:value-type="string">
            <text:p>SunWe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hase 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Naxx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hase 10</text:p>
          </table:table-cell>
          <table:table-cell office:value-type="float" office:value="43709" calcext:value-type="float">
            <text:p>43709</text:p>
          </table:table-cell>
          <table:table-cell office:value-type="string" calcext:value-type="string">
            <text:p>Uldua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Phase 11</text:p>
          </table:table-cell>
          <table:table-cell office:value-type="float" office:value="68049" calcext:value-type="float">
            <text:p>68049</text:p>
          </table:table-cell>
          <table:table-cell office:value-type="string" calcext:value-type="string">
            <text:p>To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hase 12</text:p>
          </table:table-cell>
          <table:table-cell office:value-type="float" office:value="74309" calcext:value-type="float">
            <text:p>74309</text:p>
          </table:table-cell>
          <table:table-cell office:value-type="string" calcext:value-type="string">
            <text:p>IC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10">00/00/0000</text:date>, <text:time style:data-style-name="N2" text:time-value="17:43:12.10533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7-10T15:34:11.683258100</meta:creation-date>
    <dc:date>2026-07-10T18:11:28.762860200</dc:date>
    <meta:editing-duration>PT32M38S</meta:editing-duration>
    <meta:editing-cycles>4</meta:editing-cycles>
    <meta:generator>LibreOffice/26.2.4.2$Windows_X86_64 LibreOffice_project/0229ac93fcf0d7cbc6376066c6f35021cef002dc</meta:generator>
    <meta:document-statistic meta:table-count="1" meta:cell-count="184" meta:object-count="0"/>
  </office:meta>
</office:document-meta>
</file>